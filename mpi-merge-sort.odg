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cm" loext:decorative="false"/>
    </style:style>
    <style:style style:name="gr2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.5cm" loext:decorative="false"/>
    </style:style>
    <style:style style:name="gr3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1.501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423cm" fo:min-width="0.173cm" fo:padding-top="0.142cm" fo:padding-bottom="0.142cm" fo:padding-left="0.267cm" fo:padding-right="0.267cm" draw:shadow="visible" draw:shadow-offset-x="0.106cm" draw:shadow-offset-y="0.106cm" loext:decorative="false"/>
      <style:paragraph-properties style:writing-mode="lr-tb"/>
    </style:style>
    <style:style style:name="gr5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9" style:family="graphic" style:parent-style-name="standard">
      <style:graphic-properties svg:stroke-width="0.035cm" svg:stroke-color="#666666" draw:marker-start-width="0.252cm" draw:marker-end-width="0.252cm" draw:fill-color="#cccccc" draw:textarea-horizontal-align="justify" draw:textarea-vertical-align="middle" draw:auto-grow-height="false" fo:min-height="0.423cm" fo:min-width="0.173cm" fo:padding-top="0.142cm" fo:padding-bottom="0.142cm" fo:padding-left="0.267cm" fo:padding-right="0.267cm" draw:shadow="visible" draw:shadow-offset-x="0.106cm" draw:shadow-offset-y="0.106cm" loext:decorative="false"/>
      <style:paragraph-properties style:writing-mode="lr-tb"/>
    </style:style>
    <style:style style:name="gr10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666666" loext:opacity="100%"/>
    </style:style>
    <style:style style:name="P6" style:family="paragraph">
      <loext:graphic-properties draw:fill-color="#cccccc"/>
      <style:paragraph-properties fo:text-align="center"/>
      <style:text-properties fo:color="#666666" loext:opacity="100%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0.5cm" svg:height="0.5cm" svg:x="5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0.5cm" svg:height="0.5cm" svg:x="7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0.5cm" svg:height="0.5cm" svg:x="9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1cm" svg:height="0.5cm" svg:x="3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0.5cm" svg:height="0.5cm" svg:x="11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0.5cm" svg:height="0.5cm" svg:x="12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0.5cm" svg:height="0.5cm" svg:x="13.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0.5cm" svg:height="0.5cm" svg:x="14.7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1cm" svg:height="0.5cm" svg:x="5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1cm" svg:height="0.5cm" svg:x="7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1cm" svg:height="0.5cm" svg:x="9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" draw:text-style-name="P1" draw:layer="layout" svg:width="2cm" svg:height="0.5cm" svg:x="2.5cm" svg:y="8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" draw:text-style-name="P1" draw:layer="layout" svg:width="2cm" svg:height="0.5cm" svg:x="4.5cm" svg:y="8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3" draw:text-style-name="P1" draw:layer="layout" svg:width="4cm" svg:height="0.5cm" svg:x="1.5cm" svg:y="11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4" draw:text-style-name="P3" xml:id="id2" draw:id="id2" draw:layer="layout" svg:width="0.999cm" svg:height="0.999cm" svg:x="3cm" svg:y="3.501cm">
          <text:p text:style-name="P2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0.999cm" svg:height="0.999cm" svg:x="5cm" svg:y="3.5cm">
          <text:p text:style-name="P2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0.999cm" svg:height="0.999cm" svg:x="7cm" svg:y="3.5cm">
          <text:p text:style-name="P2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0.999cm" svg:height="0.999cm" svg:x="9cm" svg:y="3.5cm">
          <text:p text:style-name="P2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0.999cm" svg:height="0.999cm" svg:x="3.001cm" svg:y="6.5cm">
          <text:p text:style-name="P2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" draw:id="id11" draw:layer="layout" svg:width="0.999cm" svg:height="0.999cm" svg:x="5.002cm" svg:y="6.5cm">
          <text:p text:style-name="P2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0.999cm" svg:height="0.999cm" svg:x="3cm" svg:y="9.5cm">
          <text:p text:style-name="P2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999cm" svg:height="0.999cm" svg:x="10.75cm" svg:y="3.501cm">
          <text:p text:style-name="P2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0.999cm" svg:height="0.999cm" svg:x="12cm" svg:y="3.5cm">
          <text:p text:style-name="P2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99cm" svg:height="0.999cm" svg:x="13.25cm" svg:y="3.5cm">
          <text:p text:style-name="P2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0.999cm" svg:height="0.999cm" svg:x="14.501cm" svg:y="3.5cm">
          <text:p text:style-name="P2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9.5cm" svg:y1="3.5cm" svg:x2="3.5cm" svg:y2="3.501cm" draw:start-shape="id1" draw:start-glue-point="4" draw:end-shape="id2" draw:end-glue-point="4" svg:d="M9500 3500c0-778-6000-779-6000 1" svg:viewBox="0 0 6001 586">
          <text:p/>
        </draw:connector>
        <draw:connector draw:style-name="gr6" draw:text-style-name="P4" draw:layer="layout" draw:type="curve" svg:x1="11.25cm" svg:y1="3.501cm" svg:x2="5.5cm" svg:y2="3.5cm" draw:start-shape="id3" draw:start-glue-point="4" draw:end-shape="id4" draw:end-glue-point="4" svg:d="M11250 3501c0-780-5750-779-5750-1" svg:viewBox="0 0 5751 586">
          <text:p/>
        </draw:connector>
        <draw:connector draw:style-name="gr7" draw:text-style-name="P4" draw:layer="layout" draw:type="curve" svg:x1="12.5cm" svg:y1="3.5cm" svg:x2="7.5cm" svg:y2="3.5cm" draw:start-shape="id5" draw:start-glue-point="4" draw:end-shape="id6" draw:end-glue-point="4" svg:d="M12500 3500c0-778-5000-778-5000 0" svg:viewBox="0 0 5001 584">
          <text:p/>
        </draw:connector>
        <draw:connector draw:style-name="gr8" draw:text-style-name="P4" draw:layer="layout" draw:type="curve" svg:x1="15.001cm" svg:y1="3.5cm" svg:x2="9.5cm" svg:y2="3.5cm" draw:start-shape="id7" draw:start-glue-point="4" draw:end-shape="id1" draw:end-glue-point="4" svg:d="M15001 3500c0-778-5501-778-5501 0" svg:viewBox="0 0 5502 584">
          <text:p/>
        </draw:connector>
        <draw:custom-shape draw:style-name="gr4" draw:text-style-name="P3" xml:id="id8" draw:id="id8" draw:layer="layout" svg:width="0.999cm" svg:height="0.999cm" svg:x="7.002cm" svg:y="6.5cm">
          <text:p text:style-name="P2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0.999cm" svg:height="0.999cm" svg:x="9.001cm" svg:y="6.501cm">
          <text:p text:style-name="P2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0.751cm" svg:y="6.5cm">
          <text:p text:style-name="P5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2.002cm" svg:y="6.501cm">
          <text:p text:style-name="P5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3.251cm" svg:y="6.5cm">
          <text:p text:style-name="P5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4.501cm" svg:y="6.5cm">
          <text:p text:style-name="P5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svg:x1="7.502cm" svg:y1="6.5cm" svg:x2="3.501cm" svg:y2="6.5cm" draw:start-shape="id8" draw:start-glue-point="4" draw:end-shape="id9" draw:end-glue-point="4" svg:d="M7502 6500c0-778-4001-778-4001 0" svg:viewBox="0 0 4002 584">
          <text:p/>
        </draw:connector>
        <draw:connector draw:style-name="gr11" draw:text-style-name="P4" draw:layer="layout" draw:type="curve" svg:x1="9.501cm" svg:y1="6.501cm" svg:x2="5.502cm" svg:y2="6.5cm" draw:start-shape="id10" draw:start-glue-point="4" draw:end-shape="id11" draw:end-glue-point="4" svg:d="M9501 6501c0-780-3999-779-3999-1" svg:viewBox="0 0 4000 586">
          <text:p/>
        </draw:connector>
        <draw:custom-shape draw:style-name="gr4" draw:text-style-name="P3" xml:id="id12" draw:id="id12" draw:layer="layout" svg:width="0.999cm" svg:height="0.999cm" svg:x="5.001cm" svg:y="9.5cm">
          <text:p text:style-name="P2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5.501cm" svg:y1="9.5cm" svg:x2="3.5cm" svg:y2="9.5cm" draw:start-shape="id12" draw:start-glue-point="4" draw:end-shape="id13" draw:end-glue-point="4" svg:d="M5501 9500c0-778-2001-778-2001 0" svg:viewBox="0 0 2002 584">
          <text:p/>
        </draw:connector>
        <draw:custom-shape draw:style-name="gr9" draw:text-style-name="P6" draw:layer="layout" svg:width="0.999cm" svg:height="0.999cm" svg:x="7cm" svg:y="9.5cm">
          <text:p text:style-name="P5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8.999cm" svg:y="9.501cm">
          <text:p text:style-name="P5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0.749cm" svg:y="9.5cm">
          <text:p text:style-name="P5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2cm" svg:y="9.501cm">
          <text:p text:style-name="P5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3.249cm" svg:y="9.5cm">
          <text:p text:style-name="P5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4.499cm" svg:y="9.5cm">
          <text:p text:style-name="P5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99cm" svg:height="0.999cm" svg:x="3.001cm" svg:y="11.751cm">
          <text:p text:style-name="P2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5.003cm" svg:y="11.75cm">
          <text:p text:style-name="P5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7.002cm" svg:y="11.75cm">
          <text:p text:style-name="P5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9.001cm" svg:y="11.751cm">
          <text:p text:style-name="P5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0.751cm" svg:y="11.75cm">
          <text:p text:style-name="P5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2.002cm" svg:y="11.751cm">
          <text:p text:style-name="P5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3.251cm" svg:y="11.75cm">
          <text:p text:style-name="P5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99cm" svg:height="0.999cm" svg:x="14.501cm" svg:y="11.75cm">
          <text:p text:style-name="P5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8T20:53:04.752660308</dc:date>
    <meta:editing-duration>PT1H6M46S</meta:editing-duration>
    <meta:editing-cycles>8</meta:editing-cycles>
    <meta:generator>LibreOffice/24.2.7.2$Linux_X86_64 LibreOffice_project/420$Build-2</meta:generator>
    <meta:document-statistic meta:object-count="54"/>
  </office:meta>
</office:document-meta>
</file>