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 loext:decorative="fals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.5cm" loext:decorative="false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1.501cm" loext:decorative="false"/>
    </style:style>
    <style:style style:name="gr4" style:family="graphic" style:parent-style-name="objectwithoutfill">
      <style:graphic-properties draw:marker-end="Arrowheads_20_27" draw:marker-end-width="0.2cm" draw:fill="none" draw:textarea-vertical-align="middle" loext:decorative="false"/>
    </style:style>
    <style:style style:name="gr5" style:family="graphic" style:parent-style-name="objectwithoutfill">
      <style:graphic-properties draw:marker-end="Arrowheads_20_28" draw:marker-end-width="0.2cm" draw:fill="none" draw:textarea-vertical-align="middle" loext:decorative="false"/>
    </style:style>
    <style:style style:name="gr6" style:family="graphic" style:parent-style-name="objectwithoutfill">
      <style:graphic-properties draw:marker-end="Arrowheads_20_29" draw:marker-end-width="0.2cm" draw:fill="none" draw:textarea-vertical-align="middle" loext:decorative="false"/>
    </style:style>
    <style:style style:name="gr7" style:family="graphic" style:parent-style-name="objectwithoutfill">
      <style:graphic-properties draw:marker-end="Arrowheads_20_30" draw:marker-end-width="0.2cm" draw:fill="none" draw:textarea-vertical-align="middle" loext:decorative="false"/>
    </style:style>
    <style:style style:name="gr8" style:family="graphic" style:parent-style-name="objectwithoutfill">
      <style:graphic-properties draw:marker-end="Arrowheads_20_31" draw:marker-end-width="0.2cm" draw:fill="none" draw:textarea-vertical-align="middle" loext:decorative="false"/>
    </style:style>
    <style:style style:name="gr9" style:family="graphic" style:parent-style-name="objectwithoutfill">
      <style:graphic-properties draw:marker-end="Arrowheads_20_32" draw:marker-end-width="0.2cm" draw:fill="none" draw:textarea-vertical-align="middle" loext:decorative="false"/>
    </style:style>
    <style:style style:name="gr10" style:family="graphic" style:parent-style-name="objectwithoutfill">
      <style:graphic-properties draw:marker-end="Arrowheads_20_33" draw:marker-end-width="0.2cm" draw:fill="none" draw:textarea-vertical-align="middle" loext:decorative="false"/>
    </style:style>
    <style:style style:name="gr11" style:family="graphic" style:parent-style-name="objectwithoutfill">
      <style:graphic-properties draw:marker-end="Arrowheads_20_34" draw:marker-end-width="0.2cm" draw:fill="none" draw:textarea-vertical-align="middle" loext:decorative="false"/>
    </style:style>
    <style:style style:name="gr12" style:family="graphic" style:parent-style-name="objectwithoutfill">
      <style:graphic-properties draw:marker-end="Arrowheads_20_39" draw:marker-end-width="0.2cm" draw:fill="none" draw:textarea-vertical-align="middle" loext:decorative="false"/>
    </style:style>
    <style:style style:name="gr13" style:family="graphic" style:parent-style-name="objectwithoutfill">
      <style:graphic-properties draw:marker-end="Arrowheads_20_40" draw:marker-end-width="0.2cm" draw:fill="none" draw:textarea-vertical-align="middle" loext:decorative="false"/>
    </style:style>
    <style:style style:name="gr14" style:family="graphic" style:parent-style-name="objectwithoutfill">
      <style:graphic-properties draw:marker-end="Arrowheads_20_41" draw:marker-end-width="0.2cm" draw:fill="none" draw:textarea-vertical-align="middle" loext:decorative="false"/>
    </style:style>
    <style:style style:name="gr15" style:family="graphic" style:parent-style-name="objectwithoutfill">
      <style:graphic-properties draw:marker-end="Arrowheads_20_16" draw:marker-end-width="0.2cm" draw:fill="none" draw:textarea-vertical-align="middle" loext:decorative="false"/>
    </style:style>
    <style:style style:name="gr16" style:family="graphic" style:parent-style-name="objectwithoutfill">
      <style:graphic-properties draw:marker-end="Arrowheads_20_44" draw:marker-end-width="0.2cm" draw:fill="none" draw:textarea-vertical-align="middle" loext:decorative="false"/>
    </style:style>
    <style:style style:name="gr17" style:family="graphic" style:parent-style-name="objectwithoutfill">
      <style:graphic-properties draw:marker-end="Arrowheads_20_45" draw:marker-end-width="0.2cm" draw:fill="none" draw:textarea-vertical-align="middle" loext:decorative="false"/>
    </style:style>
    <style:style style:name="gr18" style:family="graphic" style:parent-style-name="objectwithoutfill">
      <style:graphic-properties draw:marker-end="Arrowheads_20_35" draw:marker-end-width="0.2cm" draw:fill="none" draw:textarea-vertical-align="middle" loext:decorative="false"/>
    </style:style>
    <style:style style:name="gr19" style:family="graphic" style:parent-style-name="objectwithoutfill">
      <style:graphic-properties draw:marker-end="Arrowheads_20_36" draw:marker-end-width="0.2cm" draw:fill="none" draw:textarea-vertical-align="middle" loext:decorative="false"/>
    </style:style>
    <style:style style:name="gr20" style:family="graphic" style:parent-style-name="objectwithoutfill">
      <style:graphic-properties draw:marker-end="Arrowheads_20_37" draw:marker-end-width="0.2cm" draw:fill="none" draw:textarea-vertical-align="middle" loext:decorative="false"/>
    </style:style>
    <style:style style:name="gr21" style:family="graphic" style:parent-style-name="objectwithoutfill">
      <style:graphic-properties draw:marker-end="Arrowheads_20_38" draw:marker-end-width="0.2cm" draw:fill="none" draw:textarea-vertical-align="middle" loext:decorative="false"/>
    </style:style>
    <style:style style:name="gr22" style:family="graphic" style:parent-style-name="objectwithoutfill">
      <style:graphic-properties draw:marker-end="Arrowheads_20_42" draw:marker-end-width="0.2cm" draw:fill="none" draw:textarea-vertical-align="middle" loext:decorative="false"/>
    </style:style>
    <style:style style:name="gr23" style:family="graphic" style:parent-style-name="objectwithoutfill">
      <style:graphic-properties draw:marker-end="Arrowheads_20_43" draw:marker-end-width="0.2cm" draw:fill="none" draw:textarea-vertical-align="middle" loext:decorative="false"/>
    </style:style>
    <style:style style:name="gr24" style:family="graphic" style:parent-style-name="objectwithoutfill">
      <style:graphic-properties draw:marker-end="Arrowheads_20_26" draw:marker-end-width="0.2cm" draw:fill="none" draw:textarea-vertical-align="middle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457cm" fo:min-width="0.207cm" fo:padding-top="0.142cm" fo:padding-bottom="0.142cm" fo:padding-left="0.267cm" fo:padding-right="0.267cm" draw:shadow="visible" draw:shadow-offset-x="0.106cm" draw:shadow-offset-y="0.106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423cm" fo:min-width="0.173cm" fo:padding-top="0.142cm" fo:padding-bottom="0.142cm" fo:padding-left="0.267cm" fo:padding-right="0.267cm" draw:shadow="visible" draw:shadow-offset-x="0.106cm" draw:shadow-offset-y="0.106cm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 loext:decorative="false"/>
    </style:style>
    <style:style style:name="gr28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.5cm" loext:decorative="false"/>
    </style:style>
    <style:style style:name="gr29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1.501cm" loext:decorative="false"/>
    </style:style>
    <style:style style:name="gr30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34" style:family="graphic" style:parent-style-name="standard">
      <style:graphic-properties svg:stroke-width="0.035cm" svg:stroke-color="#666666" draw:marker-start-width="0.252cm" draw:marker-end-width="0.252cm" draw:fill-color="#cccccc" draw:textarea-horizontal-align="justify" draw:textarea-vertical-align="middle" draw:auto-grow-height="false" fo:min-height="0.423cm" fo:min-width="0.173cm" fo:padding-top="0.142cm" fo:padding-bottom="0.142cm" fo:padding-left="0.267cm" fo:padding-right="0.267cm" draw:shadow="visible" draw:shadow-offset-x="0.106cm" draw:shadow-offset-y="0.106cm" loext:decorative="false"/>
      <style:paragraph-properties style:writing-mode="lr-tb"/>
    </style:style>
    <style:style style:name="gr35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style:paragraph-properties fo:text-align="center"/>
      <style:text-properties fo:color="#666666" loext:opacity="100%"/>
    </style:style>
    <style:style style:name="P7" style:family="paragraph">
      <loext:graphic-properties draw:fill-color="#cccccc"/>
      <style:paragraph-properties fo:text-align="center"/>
      <style:text-properties fo:color="#666666" loext:opacity="10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cm" svg:height="0.5cm" svg:x="3.2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4" draw:id="id4" draw:layer="layout" svg:width="0.5cm" svg:height="0.5cm" svg:x="5.2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7" draw:id="id7" draw:layer="layout" svg:width="0.5cm" svg:height="0.5cm" svg:x="7.2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10" draw:id="id10" draw:layer="layout" svg:width="0.5cm" svg:height="0.5cm" svg:x="9.2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13" draw:id="id13" draw:layer="layout" svg:width="1cm" svg:height="0.5cm" svg:x="3cm" svg:y="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3" draw:id="id3" draw:layer="layout" svg:width="0.5cm" svg:height="0.5cm" svg:x="11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6" draw:id="id6" draw:layer="layout" svg:width="0.5cm" svg:height="0.5cm" svg:x="12.2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9" draw:id="id9" draw:layer="layout" svg:width="0.5cm" svg:height="0.5cm" svg:x="13.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12" draw:id="id12" draw:layer="layout" svg:width="0.5cm" svg:height="0.5cm" svg:x="14.75cm" svg:y="2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16" draw:id="id16" draw:layer="layout" svg:width="1cm" svg:height="0.5cm" svg:x="5cm" svg:y="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15" draw:id="id15" draw:layer="layout" svg:width="1cm" svg:height="0.5cm" svg:x="7cm" svg:y="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xml:id="id18" draw:id="id18" draw:layer="layout" svg:width="1cm" svg:height="0.5cm" svg:x="9cm" svg:y="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" draw:text-style-name="P1" xml:id="id19" draw:id="id19" draw:layer="layout" svg:width="2cm" svg:height="0.5cm" svg:x="2.5cm" svg:y="7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" draw:text-style-name="P1" xml:id="id21" draw:id="id21" draw:layer="layout" svg:width="2cm" svg:height="0.5cm" svg:x="4.5cm" svg:y="7.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3" draw:text-style-name="P1" xml:id="id22" draw:id="id22" draw:layer="layout" svg:width="4cm" svg:height="0.5cm" svg:x="1.5cm" svg:y="10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onnector draw:style-name="gr4" draw:text-style-name="P2" draw:layer="layout" draw:type="line" svg:x1="3.501cm" svg:y1="3cm" svg:x2="3.5cm" svg:y2="3.501cm" draw:start-shape="id1" draw:start-glue-point="7" draw:end-shape="id2" draw:end-glue-point="4" svg:d="M3501 3000l-1 501" svg:viewBox="0 0 2 502">
          <text:p/>
        </draw:connector>
        <draw:connector draw:style-name="gr5" draw:text-style-name="P2" draw:layer="layout" draw:type="line" svg:x1="11.251cm" svg:y1="3cm" svg:x2="3.5cm" svg:y2="3.501cm" draw:start-shape="id3" draw:start-glue-point="7" draw:end-shape="id2" draw:end-glue-point="4" svg:d="M11251 3000l-7751 501" svg:viewBox="0 0 7752 502">
          <text:p/>
        </draw:connector>
        <draw:connector draw:style-name="gr6" draw:text-style-name="P2" draw:layer="layout" draw:type="line" svg:x1="5.501cm" svg:y1="3cm" svg:x2="5.5cm" svg:y2="3.5cm" draw:start-shape="id4" draw:start-glue-point="7" draw:end-shape="id5" draw:end-glue-point="4" svg:d="M5501 3000l-1 500" svg:viewBox="0 0 2 501">
          <text:p/>
        </draw:connector>
        <draw:connector draw:style-name="gr7" draw:text-style-name="P2" draw:layer="layout" draw:type="line" svg:x1="12.501cm" svg:y1="3cm" svg:x2="5.5cm" svg:y2="3.5cm" draw:start-shape="id6" draw:start-glue-point="7" draw:end-shape="id5" draw:end-glue-point="4" svg:d="M12501 3000l-7001 500" svg:viewBox="0 0 7002 501">
          <text:p/>
        </draw:connector>
        <draw:connector draw:style-name="gr8" draw:text-style-name="P2" draw:layer="layout" draw:type="line" svg:x1="7.501cm" svg:y1="3cm" svg:x2="7.5cm" svg:y2="3.5cm" draw:start-shape="id7" draw:start-glue-point="7" draw:end-shape="id8" draw:end-glue-point="4" svg:d="M7501 3000l-1 500" svg:viewBox="0 0 2 501">
          <text:p/>
        </draw:connector>
        <draw:connector draw:style-name="gr9" draw:text-style-name="P2" draw:layer="layout" draw:type="line" svg:x1="13.751cm" svg:y1="3cm" svg:x2="7.5cm" svg:y2="3.5cm" draw:start-shape="id9" draw:start-glue-point="7" draw:end-shape="id8" draw:end-glue-point="4" svg:d="M13751 3000l-6251 500" svg:viewBox="0 0 6252 501">
          <text:p/>
        </draw:connector>
        <draw:connector draw:style-name="gr10" draw:text-style-name="P2" draw:layer="layout" draw:type="line" svg:x1="9.501cm" svg:y1="3cm" svg:x2="9.5cm" svg:y2="3.5cm" draw:start-shape="id10" draw:start-glue-point="7" draw:end-shape="id11" draw:end-glue-point="4" svg:d="M9501 3000l-1 500" svg:viewBox="0 0 2 501">
          <text:p/>
        </draw:connector>
        <draw:connector draw:style-name="gr11" draw:text-style-name="P2" draw:layer="layout" draw:type="line" svg:x1="15.001cm" svg:y1="3cm" svg:x2="9.5cm" svg:y2="3.5cm" draw:start-shape="id12" draw:start-glue-point="7" draw:end-shape="id11" draw:end-glue-point="4" svg:d="M15001 3000l-5501 500" svg:viewBox="0 0 5502 501">
          <text:p/>
        </draw:connector>
        <draw:connector draw:style-name="gr12" draw:text-style-name="P2" draw:layer="layout" draw:type="line" svg:x1="3.501cm" svg:y1="5.5cm" svg:x2="3.5cm" svg:y2="6cm" draw:start-shape="id13" draw:start-glue-point="7" draw:end-shape="id14" draw:end-glue-point="4" svg:d="M3501 5500l-1 500" svg:viewBox="0 0 2 501">
          <text:p/>
        </draw:connector>
        <draw:connector draw:style-name="gr13" draw:text-style-name="P2" draw:layer="layout" draw:type="line" svg:x1="7.501cm" svg:y1="5.5cm" svg:x2="3.5cm" svg:y2="6cm" draw:start-shape="id15" draw:start-glue-point="7" draw:end-shape="id14" draw:end-glue-point="4" svg:d="M7501 5500l-4001 500" svg:viewBox="0 0 4002 501">
          <text:p/>
        </draw:connector>
        <draw:connector draw:style-name="gr14" draw:text-style-name="P2" draw:layer="layout" draw:type="line" svg:x1="5.501cm" svg:y1="5.5cm" svg:x2="5.501cm" svg:y2="6cm" draw:start-shape="id16" draw:start-glue-point="7" draw:end-shape="id17" draw:end-glue-point="4" svg:d="M5501 5500v500" svg:viewBox="0 0 1 501">
          <text:p/>
        </draw:connector>
        <draw:connector draw:style-name="gr15" draw:text-style-name="P2" draw:layer="layout" draw:type="line" svg:x1="9.501cm" svg:y1="5.5cm" svg:x2="5.501cm" svg:y2="6cm" draw:start-shape="id18" draw:start-glue-point="7" draw:end-shape="id17" draw:end-glue-point="4" svg:d="M9501 5500l-4000 500" svg:viewBox="0 0 4001 501">
          <text:p/>
        </draw:connector>
        <draw:connector draw:style-name="gr16" draw:text-style-name="P2" draw:layer="layout" draw:type="line" svg:x1="3.501cm" svg:y1="8cm" svg:x2="3.5cm" svg:y2="8.5cm" draw:start-shape="id19" draw:start-glue-point="7" draw:end-shape="id20" draw:end-glue-point="4" svg:d="M3501 8000l-1 500" svg:viewBox="0 0 2 501">
          <text:p/>
        </draw:connector>
        <draw:connector draw:style-name="gr17" draw:text-style-name="P2" draw:layer="layout" draw:type="line" svg:x1="5.501cm" svg:y1="8cm" svg:x2="3.5cm" svg:y2="8.5cm" draw:start-shape="id21" draw:start-glue-point="7" draw:end-shape="id20" draw:end-glue-point="4" svg:d="M5501 8000l-2001 500" svg:viewBox="0 0 2002 501">
          <text:p/>
        </draw:connector>
        <draw:connector draw:style-name="gr18" draw:text-style-name="P2" draw:layer="layout" draw:type="line" svg:x1="3.5cm" svg:y1="4.5cm" svg:x2="3.501cm" svg:y2="5.25cm" draw:start-shape="id2" draw:start-glue-point="8" draw:end-shape="id13" draw:end-glue-point="9" svg:d="M3500 4500l1 750" svg:viewBox="0 0 2 751">
          <text:p/>
        </draw:connector>
        <draw:connector draw:style-name="gr19" draw:text-style-name="P2" draw:layer="layout" draw:type="line" svg:x1="5.5cm" svg:y1="4.499cm" svg:x2="5.501cm" svg:y2="5.25cm" draw:start-shape="id5" draw:start-glue-point="8" draw:end-shape="id16" draw:end-glue-point="9" svg:d="M5500 4499l1 751" svg:viewBox="0 0 2 752">
          <text:p/>
        </draw:connector>
        <draw:connector draw:style-name="gr20" draw:text-style-name="P2" draw:layer="layout" draw:type="line" svg:x1="7.5cm" svg:y1="4.499cm" svg:x2="7.501cm" svg:y2="5.25cm" draw:start-shape="id8" draw:start-glue-point="8" draw:end-shape="id15" draw:end-glue-point="9" svg:d="M7500 4499l1 751" svg:viewBox="0 0 2 752">
          <text:p/>
        </draw:connector>
        <draw:connector draw:style-name="gr21" draw:text-style-name="P2" draw:layer="layout" draw:type="line" svg:x1="9.5cm" svg:y1="4.499cm" svg:x2="9.501cm" svg:y2="5.25cm" draw:start-shape="id11" draw:start-glue-point="8" draw:end-shape="id18" draw:end-glue-point="9" svg:d="M9500 4499l1 751" svg:viewBox="0 0 2 752">
          <text:p/>
        </draw:connector>
        <draw:connector draw:style-name="gr22" draw:text-style-name="P2" draw:layer="layout" draw:type="line" svg:x1="3.5cm" svg:y1="6.999cm" svg:x2="3.501cm" svg:y2="7.75cm" draw:start-shape="id14" draw:start-glue-point="8" draw:end-shape="id19" draw:end-glue-point="9" svg:d="M3500 6999l1 751" svg:viewBox="0 0 2 752">
          <text:p/>
        </draw:connector>
        <draw:connector draw:style-name="gr23" draw:text-style-name="P2" draw:layer="layout" draw:type="line" svg:x1="5.501cm" svg:y1="6.999cm" svg:x2="5.501cm" svg:y2="7.75cm" draw:start-shape="id17" draw:start-glue-point="8" draw:end-shape="id21" draw:end-glue-point="9" svg:d="M5501 6999v751" svg:viewBox="0 0 1 752">
          <text:p/>
        </draw:connector>
        <draw:connector draw:style-name="gr24" draw:text-style-name="P2" draw:layer="layout" draw:type="line" svg:x1="3.5cm" svg:y1="9.499cm" svg:x2="3.501cm" svg:y2="10.25cm" draw:start-shape="id20" draw:start-glue-point="8" draw:end-shape="id22" draw:end-glue-point="9" svg:d="M3500 9499l1 751" svg:viewBox="0 0 2 752">
          <text:p/>
        </draw:connector>
        <draw:custom-shape draw:style-name="gr25" draw:text-style-name="P4" xml:id="id2" draw:id="id2" draw:layer="layout" svg:width="0.999cm" svg:height="0.999cm" svg:x="3cm" svg:y="3.501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" draw:id="id5" draw:layer="layout" svg:width="0.999cm" svg:height="0.999cm" svg:x="5cm" svg:y="3.5cm">
          <text:p text:style-name="P3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8" draw:id="id8" draw:layer="layout" svg:width="0.999cm" svg:height="0.999cm" svg:x="7cm" svg:y="3.5cm">
          <text:p text:style-name="P3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1" draw:id="id11" draw:layer="layout" svg:width="0.999cm" svg:height="0.999cm" svg:x="9cm" svg:y="3.5cm">
          <text:p text:style-name="P3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4" draw:id="id14" draw:layer="layout" svg:width="0.999cm" svg:height="0.999cm" svg:x="3cm" svg:y="6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" draw:id="id17" draw:layer="layout" svg:width="0.999cm" svg:height="0.999cm" svg:x="5.001cm" svg:y="6cm">
          <text:p text:style-name="P3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0" draw:id="id20" draw:layer="layout" svg:width="0.999cm" svg:height="0.999cm" svg:x="3cm" svg:y="8.5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99cm" svg:height="0.999cm" svg:x="10.75cm" svg:y="3.501cm">
          <text:p text:style-name="P3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99cm" svg:height="0.999cm" svg:x="12cm" svg:y="3.5cm">
          <text:p text:style-name="P3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99cm" svg:height="0.999cm" svg:x="13.25cm" svg:y="3.5cm">
          <text:p text:style-name="P3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99cm" svg:height="0.999cm" svg:x="14.501cm" svg:y="3.5cm">
          <text:p text:style-name="P3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7" draw:text-style-name="P5" draw:layer="layout" svg:width="0.5cm" svg:height="0.5cm" svg:x="3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5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7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9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1cm" svg:height="0.5cm" svg:x="3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11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12.2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13.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0.5cm" svg:height="0.5cm" svg:x="14.75cm" svg:y="2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1cm" svg:height="0.5cm" svg:x="5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1cm" svg:height="0.5cm" svg:x="7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7" draw:text-style-name="P5" draw:layer="layout" svg:width="1cm" svg:height="0.5cm" svg:x="9cm" svg:y="5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8" draw:text-style-name="P5" draw:layer="layout" svg:width="2cm" svg:height="0.5cm" svg:x="2.5cm" svg:y="8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8" draw:text-style-name="P5" draw:layer="layout" svg:width="2cm" svg:height="0.5cm" svg:x="4.5cm" svg:y="8.2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9" draw:text-style-name="P5" draw:layer="layout" svg:width="4cm" svg:height="0.5cm" svg:x="1.5cm" svg:y="11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6" draw:text-style-name="P4" xml:id="id24" draw:id="id24" draw:layer="layout" svg:width="0.999cm" svg:height="0.999cm" svg:x="3cm" svg:y="3.501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6" draw:id="id26" draw:layer="layout" svg:width="0.999cm" svg:height="0.999cm" svg:x="5cm" svg:y="3.5cm">
          <text:p text:style-name="P3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8" draw:id="id28" draw:layer="layout" svg:width="0.999cm" svg:height="0.999cm" svg:x="7cm" svg:y="3.5cm">
          <text:p text:style-name="P3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3" draw:id="id23" draw:layer="layout" svg:width="0.999cm" svg:height="0.999cm" svg:x="9cm" svg:y="3.5cm">
          <text:p text:style-name="P3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1" draw:id="id31" draw:layer="layout" svg:width="0.999cm" svg:height="0.999cm" svg:x="3.001cm" svg:y="6.5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3" draw:id="id33" draw:layer="layout" svg:width="0.999cm" svg:height="0.999cm" svg:x="5.002cm" svg:y="6.5cm">
          <text:p text:style-name="P3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5" draw:id="id35" draw:layer="layout" svg:width="0.999cm" svg:height="0.999cm" svg:x="3cm" svg:y="9.5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5" draw:id="id25" draw:layer="layout" svg:width="0.999cm" svg:height="0.999cm" svg:x="10.75cm" svg:y="3.501cm">
          <text:p text:style-name="P3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7" draw:id="id27" draw:layer="layout" svg:width="0.999cm" svg:height="0.999cm" svg:x="12cm" svg:y="3.5cm">
          <text:p text:style-name="P3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99cm" svg:height="0.999cm" svg:x="13.25cm" svg:y="3.5cm">
          <text:p text:style-name="P3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9" draw:id="id29" draw:layer="layout" svg:width="0.999cm" svg:height="0.999cm" svg:x="14.501cm" svg:y="3.5cm">
          <text:p text:style-name="P3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curve" svg:x1="9.5cm" svg:y1="3.5cm" svg:x2="3.5cm" svg:y2="3.501cm" draw:start-shape="id23" draw:start-glue-point="4" draw:end-shape="id24" draw:end-glue-point="4" svg:d="M9500 3500c0-778-6000-779-6000 1" svg:viewBox="0 0 6001 586">
          <text:p/>
        </draw:connector>
        <draw:connector draw:style-name="gr31" draw:text-style-name="P2" draw:layer="layout" draw:type="curve" svg:x1="11.25cm" svg:y1="3.501cm" svg:x2="5.5cm" svg:y2="3.5cm" draw:start-shape="id25" draw:start-glue-point="4" draw:end-shape="id26" draw:end-glue-point="4" svg:d="M11250 3501c0-780-5750-779-5750-1" svg:viewBox="0 0 5751 586">
          <text:p/>
        </draw:connector>
        <draw:connector draw:style-name="gr32" draw:text-style-name="P2" draw:layer="layout" draw:type="curve" svg:x1="12.5cm" svg:y1="3.5cm" svg:x2="7.5cm" svg:y2="3.5cm" draw:start-shape="id27" draw:start-glue-point="4" draw:end-shape="id28" draw:end-glue-point="4" svg:d="M12500 3500c0-778-5000-778-5000 0" svg:viewBox="0 0 5001 584">
          <text:p/>
        </draw:connector>
        <draw:connector draw:style-name="gr33" draw:text-style-name="P2" draw:layer="layout" draw:type="curve" svg:x1="15.001cm" svg:y1="3.5cm" svg:x2="9.5cm" svg:y2="3.5cm" draw:start-shape="id29" draw:start-glue-point="4" draw:end-shape="id23" draw:end-glue-point="4" svg:d="M15001 3500c0-778-5501-778-5501 0" svg:viewBox="0 0 5502 584">
          <text:p/>
        </draw:connector>
        <draw:custom-shape draw:style-name="gr26" draw:text-style-name="P4" xml:id="id30" draw:id="id30" draw:layer="layout" svg:width="0.999cm" svg:height="0.999cm" svg:x="7.002cm" svg:y="6.5cm">
          <text:p text:style-name="P3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2" draw:id="id32" draw:layer="layout" svg:width="0.999cm" svg:height="0.999cm" svg:x="9.001cm" svg:y="6.501cm">
          <text:p text:style-name="P3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0.751cm" svg:y="6.5cm">
          <text:p text:style-name="P6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2.002cm" svg:y="6.501cm">
          <text:p text:style-name="P6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3.251cm" svg:y="6.5cm">
          <text:p text:style-name="P6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4.501cm" svg:y="6.5cm">
          <text:p text:style-name="P6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2" draw:layer="layout" draw:type="curve" svg:x1="7.502cm" svg:y1="6.5cm" svg:x2="3.501cm" svg:y2="6.5cm" draw:start-shape="id30" draw:start-glue-point="4" draw:end-shape="id31" draw:end-glue-point="4" svg:d="M7502 6500c0-778-4001-778-4001 0" svg:viewBox="0 0 4002 584">
          <text:p/>
        </draw:connector>
        <draw:connector draw:style-name="gr36" draw:text-style-name="P2" draw:layer="layout" draw:type="curve" svg:x1="9.501cm" svg:y1="6.501cm" svg:x2="5.502cm" svg:y2="6.5cm" draw:start-shape="id32" draw:start-glue-point="4" draw:end-shape="id33" draw:end-glue-point="4" svg:d="M9501 6501c0-780-3999-779-3999-1" svg:viewBox="0 0 4000 586">
          <text:p/>
        </draw:connector>
        <draw:custom-shape draw:style-name="gr26" draw:text-style-name="P4" xml:id="id34" draw:id="id34" draw:layer="layout" svg:width="0.999cm" svg:height="0.999cm" svg:x="5.001cm" svg:y="9.5cm">
          <text:p text:style-name="P3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curve" svg:x1="5.501cm" svg:y1="9.5cm" svg:x2="3.5cm" svg:y2="9.5cm" draw:start-shape="id34" draw:start-glue-point="4" draw:end-shape="id35" draw:end-glue-point="4" svg:d="M5501 9500c0-778-2001-778-2001 0" svg:viewBox="0 0 2002 584">
          <text:p/>
        </draw:connector>
        <draw:custom-shape draw:style-name="gr34" draw:text-style-name="P7" draw:layer="layout" svg:width="0.999cm" svg:height="0.999cm" svg:x="7cm" svg:y="9.5cm">
          <text:p text:style-name="P6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8.999cm" svg:y="9.501cm">
          <text:p text:style-name="P6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0.749cm" svg:y="9.5cm">
          <text:p text:style-name="P6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2cm" svg:y="9.501cm">
          <text:p text:style-name="P6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3.249cm" svg:y="9.5cm">
          <text:p text:style-name="P6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4.499cm" svg:y="9.5cm">
          <text:p text:style-name="P6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99cm" svg:height="0.999cm" svg:x="3.001cm" svg:y="11.751cm">
          <text:p text:style-name="P3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5.003cm" svg:y="11.75cm">
          <text:p text:style-name="P6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7.002cm" svg:y="11.75cm">
          <text:p text:style-name="P6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9.001cm" svg:y="11.751cm">
          <text:p text:style-name="P6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0.751cm" svg:y="11.75cm">
          <text:p text:style-name="P6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2.002cm" svg:y="11.751cm">
          <text:p text:style-name="P6"><text:span text:style-name="T1">P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3.251cm" svg:y="11.75cm">
          <text:p text:style-name="P6"><text:span text:style-name="T1">P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999cm" svg:height="0.999cm" svg:x="14.501cm" svg:y="11.75cm">
          <text:p text:style-name="P6"><text:span text:style-name="T1">P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8T20:45:40.992282153</dc:date>
    <meta:editing-duration>PT59M42S</meta:editing-duration>
    <meta:editing-cycles>7</meta:editing-cycles>
    <meta:generator>LibreOffice/24.2.7.2$Linux_X86_64 LibreOffice_project/420$Build-2</meta:generator>
    <meta:document-statistic meta:object-count="101"/>
  </office:meta>
</office:document-meta>
</file>