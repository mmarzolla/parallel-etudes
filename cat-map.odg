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cm" svg:stroke-color="#b2b2b2" draw:marker-start-width="0.2cm" draw:marker-end-width="0.2cm" draw:fill="none" draw:textarea-horizontal-align="justify" draw:textarea-vertical-align="middle" draw:auto-grow-height="false" fo:min-height="1.75cm" fo:min-width="1.5cm" fo:padding-top="0.125cm" fo:padding-bottom="0.125cm" fo:padding-left="0.25cm" fo:padding-right="0.25cm" loext:decorative="false"/>
    </style:style>
    <style:style style:name="gr2" style:family="graphic" style:parent-style-name="standard">
      <style:graphic-properties draw:stroke="dash" draw:stroke-dash="Fine_20_Dashed" svg:stroke-color="#b2b2b2" draw:fill="none" draw:textarea-horizontal-align="justify" draw:textarea-vertical-align="middle" draw:auto-grow-height="false" fo:min-height="1.75cm" fo:min-width="1.5cm" loext:decorative="false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75cm" fo:min-width="1.5cm" loext:decorative="false"/>
    </style:style>
    <style:style style:name="gr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479cm" fo:min-width="2.796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950e" draw:textarea-vertical-align="middle" loext:decorative="false"/>
    </style:style>
    <style:style style:name="gr6" style:family="graphic" style:parent-style-name="standard">
      <style:graphic-properties svg:stroke-color="#000000" draw:fill-color="#993366" draw:textarea-vertical-align="middle" loext:decorative="false"/>
    </style:style>
    <style:style style:name="gr7" style:family="graphic" style:parent-style-name="standard">
      <style:graphic-properties svg:stroke-color="#000000" draw:textarea-vertical-align="middle" loext:decorative="false"/>
    </style:style>
    <style:style style:name="gr8" style:family="graphic" style:parent-style-name="standard">
      <style:graphic-properties svg:stroke-color="#000000" draw:fill-color="#aecf00" draw:textarea-vertical-align="middle" loext:decorative="false"/>
    </style:style>
    <style:style style:name="gr9" style:family="graphic" style:parent-style-name="objectwithoutfill">
      <style:graphic-properties svg:stroke-width="0.05cm" svg:stroke-color="#000000" draw:marker-start-width="0.275cm" draw:marker-end="Arrow" draw:marker-end-width="0.25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solid" draw:fill-color="#ffff99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ff950e"/>
      <style:paragraph-properties fo:text-align="center"/>
    </style:style>
    <style:style style:name="P5" style:family="paragraph">
      <loext:graphic-properties draw:fill-color="#993366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aecf00"/>
      <style:paragraph-properties fo:text-align="center"/>
    </style:style>
    <style:style style:name="P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2.5cm" svg:y="13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2cm" svg:height="2cm" svg:x="14.5cm" svg:y="13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2cm" svg:height="2cm" svg:x="14.5cm" svg:y="1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2cm" svg:height="2cm" svg:x="12.5cm" svg:y="1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2cm" svg:height="2cm" svg:x="12.5cm" svg:y="11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2cm" svg:height="2cm" svg:x="14.5cm" svg:y="11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2cm" svg:height="2cm" svg:x="2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4cm" svg:y="1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4cm" svg:y="1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2cm" svg:y="1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4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2cm" svg:y="1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7.25cm" svg:y="13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2cm" svg:height="2cm" svg:x="9.25cm" svg:y="13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2cm" svg:height="2cm" svg:x="9.25cm" svg:y="1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2cm" svg:height="2cm" svg:x="9.25cm" svg:y="11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2cm" svg:height="2cm" svg:x="7.25cm" svg:y="1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2cm" svg:height="2cm" svg:x="7.25cm" svg:y="11.5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3" draw:layer="layout" svg:width="3.296cm" svg:height="0.729cm" svg:x="1cm" svg:y="9.75cm">
          <draw:text-box>
            <text:p><text:span text:style-name="T1">cat-map.svg</text:span></text:p>
          </draw:text-box>
        </draw:frame>
        <draw:polygon draw:style-name="gr5" draw:text-style-name="P4" draw:layer="layout" svg:width="1.999cm" svg:height="1.999cm" draw:transform="rotate (-3.14159265358979) translate (14.5cm 13.5cm)" svg:viewBox="0 0 2000 2000" draw:points="0,0 1000,0 2000,2000">
          <text:p/>
        </draw:polygon>
        <draw:polygon draw:style-name="gr6" draw:text-style-name="P5" draw:layer="layout" svg:width="0.999cm" svg:height="1.999cm" draw:transform="rotate (-3.14159265358979) translate (10.25cm 15.5cm)" svg:viewBox="0 0 1000 2000" draw:points="1000,2000 0,0 1000,0">
          <text:p/>
        </draw:polygon>
        <draw:polygon draw:style-name="gr7" draw:text-style-name="P6" draw:layer="layout" svg:width="0.999cm" svg:height="1.999cm" draw:transform="rotate (-3.14159265358979) translate (9.25cm 15.5cm)" svg:viewBox="0 0 1000 2000" draw:points="0,2000 1000,2000 0,0">
          <text:p/>
        </draw:polygon>
        <draw:polygon draw:style-name="gr8" draw:text-style-name="P7" draw:layer="layout" svg:width="1.999cm" svg:height="1.999cm" draw:transform="rotate (-3.14159265358979) translate (11.25cm 17.5cm)" svg:viewBox="0 0 2000 2000" draw:points="0,0 1000,2000 2000,2000">
          <text:p/>
        </draw:polygon>
        <draw:line draw:style-name="gr9" draw:text-style-name="P1" draw:layer="layout" svg:x1="2cm" svg:y1="11.5cm" svg:x2="6.5cm" svg:y2="11.5cm">
          <text:p/>
        </draw:line>
        <draw:line draw:style-name="gr9" draw:text-style-name="P1" draw:layer="layout" svg:x1="2cm" svg:y1="11.5cm" svg:x2="2cm" svg:y2="18cm">
          <text:p/>
        </draw:line>
        <draw:frame draw:style-name="gr10" draw:text-style-name="P8" draw:layer="layout" svg:width="0.68cm" svg:height="0.645cm" svg:x="9cm" svg:y="10.855cm">
          <draw:text-box>
            <text:p><text:span text:style-name="T2">x</text:span></text:p>
          </draw:text-box>
        </draw:frame>
        <draw:line draw:style-name="gr9" draw:text-style-name="P1" draw:layer="layout" svg:x1="7.25cm" svg:y1="11.5cm" svg:x2="11.75cm" svg:y2="11.5cm">
          <text:p/>
        </draw:line>
        <draw:line draw:style-name="gr9" draw:text-style-name="P1" draw:layer="layout" svg:x1="7.25cm" svg:y1="11.5cm" svg:x2="7.25cm" svg:y2="18cm">
          <text:p/>
        </draw:line>
        <draw:frame draw:style-name="gr10" draw:text-style-name="P8" draw:layer="layout" svg:width="0.68cm" svg:height="0.645cm" svg:x="6.57cm" svg:y="14.25cm">
          <draw:text-box>
            <text:p><text:span text:style-name="T2">y</text:span></text:p>
          </draw:text-box>
        </draw:frame>
        <draw:polygon draw:style-name="gr5" draw:text-style-name="P4" draw:layer="layout" svg:width="1.999cm" svg:height="1.999cm" draw:transform="rotate (-3.14159265358979) translate (9.25cm 13.5cm)" svg:viewBox="0 0 2000 2000" draw:points="0,0 1000,0 2000,2000">
          <text:p/>
        </draw:polygon>
        <draw:polygon draw:style-name="gr7" draw:text-style-name="P6" draw:layer="layout" svg:width="0.999cm" svg:height="1.999cm" draw:transform="rotate (-3.14159265358979) translate (14.5cm 13.5cm)" svg:viewBox="0 0 1000 2000" draw:points="0,2000 1000,2000 0,0">
          <text:p/>
        </draw:polygon>
        <draw:polygon draw:style-name="gr6" draw:text-style-name="P5" draw:layer="layout" svg:width="0.999cm" svg:height="1.999cm" draw:transform="rotate (-3.14159265358979) translate (13.5cm 13.5cm)" svg:viewBox="0 0 1000 2000" draw:points="1000,2000 0,0 1000,0">
          <text:p/>
        </draw:polygon>
        <draw:polygon draw:style-name="gr8" draw:text-style-name="P7" draw:layer="layout" svg:width="1.999cm" svg:height="1.999cm" draw:transform="rotate (-3.14159265358979) translate (14.5cm 13.5cm)" svg:viewBox="0 0 2000 2000" draw:points="0,0 1000,2000 2000,2000">
          <text:p/>
        </draw:polygon>
        <draw:line draw:style-name="gr9" draw:text-style-name="P1" draw:layer="layout" svg:x1="12.5cm" svg:y1="11.5cm" svg:x2="17cm" svg:y2="11.5cm">
          <text:p/>
        </draw:line>
        <draw:line draw:style-name="gr9" draw:text-style-name="P1" draw:layer="layout" svg:x1="12.5cm" svg:y1="11.5cm" svg:x2="12.5cm" svg:y2="1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15T20:13:42.784987231</dc:date>
    <meta:editing-duration>PT40M18S</meta:editing-duration>
    <meta:editing-cycles>26</meta:editing-cycles>
    <meta:generator>LibreOffice/24.2.7.2$Linux_X86_64 LibreOffice_project/420$Build-2</meta:generator>
    <meta:document-statistic meta:object-count="35"/>
  </office:meta>
</office:document-meta>
</file>